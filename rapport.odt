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D000002346041DE83.png" manifest:media-type="image/png"/>
  <manifest:file-entry manifest:full-path="Pictures/1000000000001004000006572A82B0B6.png" manifest:media-type="image/png"/>
  <manifest:file-entry manifest:full-path="Pictures/10000001000002F50000019FEAD6F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tyle:font-family-generic="roman" style:font-pitch="variable"/>
    <style:font-face style:name="Inter1"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877cm" style:rel-column-width="22656*"/>
    </style:style>
    <style:style style:name="Tableau1.B" style:family="table-column">
      <style:table-column-properties style:column-width="11.123cm" style:rel-column-width="42879*"/>
    </style:style>
    <style:style style:name="Tableau1.A1" style:family="table-cell">
      <style:table-cell-properties fo:padding="0.097cm" fo:border-left="0.5pt solid #ffffff" fo:border-right="none" fo:border-top="0.5pt solid #ffffff" fo:border-bottom="0.5pt solid #ffffff"/>
    </style:style>
    <style:style style:name="Tableau1.B1" style:family="table-cell">
      <style:table-cell-properties fo:padding="0.097cm" fo:border="0.5pt solid #ffffff"/>
    </style:style>
    <style:style style:name="Tableau1.A2" style:family="table-cell">
      <style:table-cell-properties fo:padding="0.097cm" fo:border-left="0.5pt solid #ffffff" fo:border-right="none" fo:border-top="none" fo:border-bottom="0.5pt solid #ffffff"/>
    </style:style>
    <style:style style:name="Tableau1.B2" style:family="table-cell">
      <style:table-cell-properties fo:padding="0.097cm" fo:border-left="0.5pt solid #ffffff" fo:border-right="0.5pt solid #ffffff" fo:border-top="none" fo:border-bottom="0.5pt solid #ffffff"/>
    </style:style>
    <style:style style:name="Tableau1.7" style:family="table-row">
      <style:table-row-properties style:min-row-height="0.609cm"/>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style:vertical-align="middle" fo:background-color="#afd095" fo:padding="0.097cm" fo:border="0.5pt solid #000000">
        <style:background-image/>
      </style:table-cell-properties>
    </style:style>
    <style:style style:name="Tableau3.A2" style:family="table-cell">
      <style:table-cell-properties style:vertical-align="middle" fo:background-color="#ffffa6" fo:padding="0.097cm" fo:border-left="0.5pt solid #000000" fo:border-right="0.5pt solid #000000" fo:border-top="none" fo:border-bottom="0.5pt solid #000000">
        <style:background-image/>
      </style:table-cell-properties>
    </style:style>
    <style:style style:name="Tableau3.A3" style:family="table-cell">
      <style:table-cell-properties style:vertical-align="middle" fo:background-color="#ffaa95" fo:padding="0.097cm" fo:border-left="0.5pt solid #000000" fo:border-right="0.5pt solid #000000" fo:border-top="none" fo:border-bottom="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2.C1" style:family="table-cell">
      <style:table-cell-properties fo:background-color="#5983b0" fo:padding="0.097cm" fo:border="0.5pt solid #000000">
        <style:background-image/>
      </style:table-cell-properties>
    </style:style>
    <style:style style:name="Tableau2.A2" style:family="table-cell">
      <style:table-cell-properties style:vertical-align="middle" fo:background-color="#afd09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fo:padding="0.097cm" fo:border-left="0.5pt solid #000000" fo:border-right="0.5pt solid #000000"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fo:padding="0.097cm" fo:border-left="0.5pt solid #000000" fo:border-right="0.5pt solid #000000" fo:border-top="none" fo:border-bottom="0.5pt solid #000000"/>
    </style:style>
    <style:style style:name="Tableau2.A6" style:family="table-cell">
      <style:table-cell-properties style:vertical-align="middle" fo:background-color="#ffffa6" fo:padding="0.097cm" fo:border-left="0.5pt solid #000000" fo:border-right="none" fo:border-top="none" fo:border-bottom="0.5pt solid #000000">
        <style:background-image/>
      </style:table-cell-properties>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fo:padding="0.097cm" fo:border-left="0.5pt solid #000000" fo:border-right="0.5pt solid #000000" fo:border-top="none" fo:border-bottom="0.5pt solid #000000"/>
    </style:style>
    <style:style style:name="Tableau2.B7" style:family="table-cell">
      <style:table-cell-properties style:vertical-align="middle" fo:padding="0.097cm" fo:border-left="0.5pt solid #000000" fo:border-right="none" fo:border-top="none" fo:border-bottom="0.5pt solid #000000"/>
    </style:style>
    <style:style style:name="Tableau2.C7" style:family="table-cell">
      <style:table-cell-properties fo:padding="0.097cm" fo:border-left="0.5pt solid #000000" fo:border-right="0.5pt solid #000000" fo:border-top="none" fo:border-bottom="0.5pt solid #000000"/>
    </style:style>
    <style:style style:name="Tableau2.B8" style:family="table-cell">
      <style:table-cell-properties style:vertical-align="middle" fo:padding="0.097cm" fo:border-left="0.5pt solid #000000" fo:border-right="none" fo:border-top="none" fo:border-bottom="0.5pt solid #000000"/>
    </style:style>
    <style:style style:name="Tableau2.C8" style:family="table-cell">
      <style:table-cell-properties fo:padding="0.097cm" fo:border-left="0.5pt solid #000000" fo:border-right="0.5pt solid #000000" fo:border-top="none" fo:border-bottom="0.5pt solid #000000"/>
    </style:style>
    <style:style style:name="Tableau2.B9" style:family="table-cell">
      <style:table-cell-properties style:vertical-align="middle" fo:padding="0.097cm" fo:border-left="0.5pt solid #000000" fo:border-right="none" fo:border-top="none" fo:border-bottom="0.5pt solid #000000"/>
    </style:style>
    <style:style style:name="Tableau2.C9"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left="0.5pt solid #ffffff" fo:border-right="none" fo:border-top="0.5pt solid #ffffff" fo:border-bottom="0.5pt solid #ffffff"/>
    </style:style>
    <style:style style:name="Tableau4.A2" style:family="table-cell">
      <style:table-cell-properties fo:padding="0.097cm" fo:border-left="0.5pt solid #ffffff" fo:border-right="none" fo:border-top="none" fo:border-bottom="0.5pt solid #ffffff"/>
    </style:style>
    <style:style style:name="Tableau4.3" style:family="table-row">
      <style:table-row-properties style:min-row-height="0.609cm"/>
    </style:style>
    <style:style style:name="P1" style:family="paragraph" style:parent-style-name="Header_20_left">
      <style:text-properties officeooo:paragraph-rsid="004150be"/>
    </style:style>
    <style:style style:name="P2" style:family="paragraph" style:parent-style-name="Footer">
      <style:paragraph-properties fo:text-align="end" style:justify-single-word="false"/>
    </style:style>
    <style:style style:name="P3" style:family="paragraph" style:parent-style-name="Text_20_body">
      <style:text-properties officeooo:rsid="001aff15" officeooo:paragraph-rsid="001aff15"/>
    </style:style>
    <style:style style:name="P4" style:family="paragraph" style:parent-style-name="Text_20_body">
      <style:text-properties officeooo:paragraph-rsid="001ba25c"/>
    </style:style>
    <style:style style:name="P5" style:family="paragraph" style:parent-style-name="Text_20_body">
      <style:paragraph-properties fo:break-before="page"/>
      <style:text-properties officeooo:paragraph-rsid="001ba25c"/>
    </style:style>
    <style:style style:name="P6" style:family="paragraph" style:parent-style-name="Table_20_Contents">
      <style:text-properties officeooo:paragraph-rsid="001aff15"/>
    </style:style>
    <style:style style:name="P7" style:family="paragraph" style:parent-style-name="Text_20_body">
      <style:text-properties officeooo:paragraph-rsid="001aff15"/>
    </style:style>
    <style:style style:name="P8" style:family="paragraph" style:parent-style-name="Table_20_Contents">
      <style:text-properties officeooo:rsid="001cf880" officeooo:paragraph-rsid="001cf880"/>
    </style:style>
    <style:style style:name="P9" style:family="paragraph" style:parent-style-name="Text_20_body">
      <style:text-properties officeooo:rsid="001cf880" officeooo:paragraph-rsid="001ba25c"/>
    </style:style>
    <style:style style:name="P10" style:family="paragraph" style:parent-style-name="Table_20_Contents">
      <style:text-properties officeooo:rsid="001d5d93" officeooo:paragraph-rsid="001d5d93"/>
    </style:style>
    <style:style style:name="P11" style:family="paragraph" style:parent-style-name="Table_20_Contents">
      <style:text-properties officeooo:paragraph-rsid="001d5d93"/>
    </style:style>
    <style:style style:name="P12" style:family="paragraph" style:parent-style-name="Text_20_body">
      <style:text-properties officeooo:paragraph-rsid="001d5d93"/>
    </style:style>
    <style:style style:name="P13" style:family="paragraph" style:parent-style-name="Table_20_Contents">
      <style:paragraph-properties fo:text-align="center" style:justify-single-word="false"/>
      <style:text-properties fo:font-weight="bold" officeooo:rsid="001d5d93" officeooo:paragraph-rsid="001d5d93" style:font-weight-asian="bold" style:font-weight-complex="bold"/>
    </style:style>
    <style:style style:name="P14" style:family="paragraph" style:parent-style-name="Table_20_Contents">
      <style:paragraph-properties fo:text-align="center" style:justify-single-word="false"/>
      <style:text-properties fo:font-weight="bold" officeooo:rsid="001db9cd" officeooo:paragraph-rsid="001db9cd" style:font-weight-asian="bold" style:font-weight-complex="bold"/>
    </style:style>
    <style:style style:name="P15" style:family="paragraph" style:parent-style-name="Table_20_Contents">
      <style:paragraph-properties fo:text-align="center" style:justify-single-word="false"/>
      <style:text-properties officeooo:rsid="001e67b3" officeooo:paragraph-rsid="001e67b3"/>
    </style:style>
    <style:style style:name="P16" style:family="paragraph" style:parent-style-name="Text_20_body">
      <style:text-properties fo:font-style="normal" style:text-underline-style="solid" style:text-underline-width="auto" style:text-underline-color="font-color" fo:font-weight="bold" officeooo:rsid="001aff15" officeooo:paragraph-rsid="001aff15" style:font-style-asian="normal" style:font-weight-asian="bold" style:font-style-complex="normal" style:font-weight-complex="bold"/>
    </style:style>
    <style:style style:name="P17" style:family="paragraph" style:parent-style-name="Text_20_body">
      <style:text-properties style:text-underline-style="solid" style:text-underline-width="auto" style:text-underline-color="font-color" fo:font-weight="bold" officeooo:rsid="001aff15" officeooo:paragraph-rsid="001aff15" style:font-weight-asian="bold" style:font-weight-complex="bold"/>
    </style:style>
    <style:style style:name="P18" style:family="paragraph" style:parent-style-name="Text_20_body">
      <style:text-properties officeooo:rsid="001ba25c" officeooo:paragraph-rsid="001ba25c"/>
    </style:style>
    <style:style style:name="P19" style:family="paragraph" style:parent-style-name="Text_20_body">
      <style:text-properties fo:color="#158466" loext:opacity="100%" officeooo:rsid="001aff15" officeooo:paragraph-rsid="001d5d93"/>
    </style:style>
    <style:style style:name="P20" style:family="paragraph" style:parent-style-name="Text_20_body">
      <style:text-properties officeooo:paragraph-rsid="00219a70"/>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4">
      <style:paragraph-properties>
        <style:tab-stops>
          <style:tab-stop style:position="15.499cm" style:type="right" style:leader-style="dotted" style:leader-text="."/>
        </style:tab-stops>
      </style:paragraph-properties>
    </style:style>
    <style:style style:name="P24" style:family="paragraph" style:parent-style-name="Contents_20_5">
      <style:paragraph-properties>
        <style:tab-stops>
          <style:tab-stop style:position="14.998cm" style:type="right" style:leader-style="dotted" style:leader-text="."/>
        </style:tab-stops>
      </style:paragraph-properties>
    </style:style>
    <style:style style:name="P25" style:family="paragraph" style:parent-style-name="Text_20_body">
      <style:text-properties officeooo:paragraph-rsid="00242a77"/>
    </style:style>
    <style:style style:name="P26" style:family="paragraph" style:parent-style-name="Standard">
      <style:text-properties officeooo:paragraph-rsid="0024f481"/>
    </style:style>
    <style:style style:name="P27" style:family="paragraph" style:parent-style-name="Text_20_body">
      <style:text-properties officeooo:paragraph-rsid="00255f4e"/>
    </style:style>
    <style:style style:name="P28" style:family="paragraph" style:parent-style-name="Table_20_Contents">
      <style:paragraph-properties fo:text-align="center" style:justify-single-word="false"/>
      <style:text-properties officeooo:rsid="001db9cd" officeooo:paragraph-rsid="001db9cd"/>
    </style:style>
    <style:style style:name="P29" style:family="paragraph" style:parent-style-name="Table_20_Contents">
      <style:paragraph-properties fo:text-align="center" style:justify-single-word="false"/>
    </style:style>
    <style:style style:name="P30" style:family="paragraph" style:parent-style-name="Text_20_body">
      <style:text-properties officeooo:rsid="00242a77" officeooo:paragraph-rsid="00255f4e"/>
    </style:style>
    <style:style style:name="P31" style:family="paragraph" style:parent-style-name="Text_20_body">
      <style:text-properties officeooo:rsid="00255f4e" officeooo:paragraph-rsid="00255f4e"/>
    </style:style>
    <style:style style:name="P32" style:family="paragraph" style:parent-style-name="Text_20_body">
      <style:paragraph-properties fo:break-before="page"/>
    </style:style>
    <style:style style:name="P33" style:family="paragraph" style:parent-style-name="Text_20_body">
      <style:text-properties officeooo:rsid="002800b0" officeooo:paragraph-rsid="002800b0"/>
    </style:style>
    <style:style style:name="P34" style:family="paragraph" style:parent-style-name="Text_20_body">
      <style:text-properties officeooo:paragraph-rsid="002eba95"/>
    </style:style>
    <style:style style:name="P35" style:family="paragraph" style:parent-style-name="Text_20_body">
      <style:text-properties officeooo:paragraph-rsid="0030aff5"/>
    </style:style>
    <style:style style:name="P36" style:family="paragraph" style:parent-style-name="Text_20_body">
      <style:text-properties officeooo:paragraph-rsid="00374efe"/>
    </style:style>
    <style:style style:name="P37" style:family="paragraph" style:parent-style-name="Text_20_body">
      <style:text-properties officeooo:rsid="004780a1" officeooo:paragraph-rsid="004780a1"/>
    </style:style>
    <style:style style:name="P38" style:family="paragraph" style:parent-style-name="Text_20_body">
      <style:text-properties officeooo:rsid="0047c5d9" officeooo:paragraph-rsid="0047c5d9"/>
    </style:style>
    <style:style style:name="P39" style:family="paragraph" style:parent-style-name="Standard">
      <style:text-properties officeooo:rsid="004ac5ee" officeooo:paragraph-rsid="004ac5ee"/>
    </style:style>
    <style:style style:name="P40" style:family="paragraph" style:parent-style-name="Text_20_body">
      <style:text-properties officeooo:paragraph-rsid="004ac5ee"/>
    </style:style>
    <style:style style:name="P41" style:family="paragraph" style:parent-style-name="Heading_20_1">
      <style:paragraph-properties fo:text-align="center" style:justify-single-word="false"/>
      <style:text-properties fo:font-size="40pt" officeooo:rsid="001ad813" officeooo:paragraph-rsid="001ad813" style:font-size-asian="40pt" style:font-size-complex="40pt"/>
    </style:style>
    <style:style style:name="P42" style:family="paragraph" style:parent-style-name="Heading_20_2">
      <style:text-properties officeooo:rsid="001aff15" officeooo:paragraph-rsid="001aff15"/>
    </style:style>
    <style:style style:name="P43" style:family="paragraph" style:parent-style-name="Heading_20_2">
      <style:text-properties officeooo:paragraph-rsid="001ba25c"/>
    </style:style>
    <style:style style:name="P44" style:family="paragraph" style:parent-style-name="Heading_20_2">
      <style:text-properties officeooo:paragraph-rsid="00242a77"/>
    </style:style>
    <style:style style:name="P45" style:family="paragraph" style:parent-style-name="Heading_20_4">
      <style:text-properties officeooo:paragraph-rsid="0024f481"/>
    </style:style>
    <style:style style:name="P46" style:family="paragraph" style:parent-style-name="Heading_20_4">
      <style:text-properties officeooo:paragraph-rsid="00255f4e"/>
    </style:style>
    <style:style style:name="P47" style:family="paragraph" style:parent-style-name="Heading_20_5">
      <style:text-properties fo:font-weight="bold"/>
    </style:style>
    <style:style style:name="P48" style:family="paragraph" style:parent-style-name="Legende" style:list-style-name="L13"/>
    <style:style style:name="P49" style:family="paragraph" style:parent-style-name="Legende" style:list-style-name="L13">
      <style:text-properties officeooo:paragraph-rsid="00231b6b"/>
    </style:style>
    <style:style style:name="P50" style:family="paragraph" style:parent-style-name="Standard">
      <style:paragraph-properties fo:margin-top="0.423cm" fo:margin-bottom="0.423cm" style:contextual-spacing="false" fo:line-height="100%" fo:text-align="justify" style:justify-single-word="false"/>
      <style:text-properties style:font-name="Liberation Serif" officeooo:paragraph-rsid="004d40ef" style:font-name-asian="Inter1" style:font-name-complex="Inter1"/>
    </style:style>
    <style:style style:name="P51" style:family="paragraph" style:parent-style-name="Standard">
      <style:paragraph-properties fo:margin-top="0cm" fo:margin-bottom="0.423cm" style:contextual-spacing="false" fo:line-height="100%" fo:text-align="justify" style:justify-single-word="false"/>
      <style:text-properties style:font-name="Liberation Serif" officeooo:paragraph-rsid="004d40ef" style:font-name-asian="Inter1" style:font-name-complex="Inter1"/>
    </style:style>
    <style:style style:name="P52" style:family="paragraph" style:parent-style-name="Table_20_Contents" style:list-style-name="L3">
      <style:text-properties officeooo:rsid="001db9cd" officeooo:paragraph-rsid="001db9cd"/>
    </style:style>
    <style:style style:name="P53" style:family="paragraph" style:parent-style-name="Table_20_Contents" style:list-style-name="L3">
      <style:text-properties officeooo:rsid="001db9cd" officeooo:paragraph-rsid="0047bd48"/>
    </style:style>
    <style:style style:name="P54" style:family="paragraph" style:parent-style-name="Table_20_Contents" style:list-style-name="L4">
      <style:text-properties officeooo:rsid="001db9cd" officeooo:paragraph-rsid="001db9cd"/>
    </style:style>
    <style:style style:name="P55" style:family="paragraph" style:parent-style-name="Table_20_Contents" style:list-style-name="L5">
      <style:text-properties officeooo:rsid="001db9cd" officeooo:paragraph-rsid="001db9cd"/>
    </style:style>
    <style:style style:name="P56" style:family="paragraph" style:parent-style-name="Table_20_Contents" style:list-style-name="L5">
      <style:text-properties officeooo:rsid="001db9cd" officeooo:paragraph-rsid="0047bd48"/>
    </style:style>
    <style:style style:name="P57" style:family="paragraph" style:parent-style-name="Table_20_Contents" style:list-style-name="L6">
      <style:text-properties officeooo:rsid="001db9cd" officeooo:paragraph-rsid="001db9cd"/>
    </style:style>
    <style:style style:name="P58" style:family="paragraph" style:parent-style-name="Table_20_Contents" style:list-style-name="L6">
      <style:text-properties officeooo:rsid="001db9cd" officeooo:paragraph-rsid="0047bd48"/>
    </style:style>
    <style:style style:name="P59" style:family="paragraph" style:parent-style-name="Table_20_Contents" style:list-style-name="L7">
      <style:text-properties officeooo:rsid="001db9cd" officeooo:paragraph-rsid="001db9cd"/>
    </style:style>
    <style:style style:name="P60" style:family="paragraph" style:parent-style-name="Table_20_Contents" style:list-style-name="L3">
      <style:text-properties officeooo:rsid="001aff15" officeooo:paragraph-rsid="001db9cd"/>
    </style:style>
    <style:style style:name="P61" style:family="paragraph" style:parent-style-name="Table_20_Contents" style:list-style-name="L5">
      <style:text-properties officeooo:rsid="001aff15" officeooo:paragraph-rsid="001db9cd"/>
    </style:style>
    <style:style style:name="P62" style:family="paragraph" style:parent-style-name="Table_20_Contents" style:list-style-name="L6">
      <style:text-properties officeooo:rsid="001aff15" officeooo:paragraph-rsid="0047bd48"/>
    </style:style>
    <style:style style:name="P63" style:family="paragraph" style:parent-style-name="Text_20_body" style:list-style-name="L12">
      <style:text-properties officeooo:paragraph-rsid="001db9cd"/>
    </style:style>
    <style:style style:name="P64" style:family="paragraph" style:parent-style-name="Text_20_body" style:list-style-name="L12">
      <style:text-properties officeooo:rsid="001ba25c" officeooo:paragraph-rsid="001db9cd"/>
    </style:style>
    <style:style style:name="P65" style:family="paragraph" style:parent-style-name="Text_20_body" style:list-style-name="L12">
      <style:text-properties officeooo:rsid="001ba25c" officeooo:paragraph-rsid="001ba25c"/>
    </style:style>
    <style:style style:name="P66" style:family="paragraph" style:parent-style-name="Text_20_body" style:list-style-name="L14">
      <style:text-properties officeooo:paragraph-rsid="003ecac6"/>
    </style:style>
    <style:style style:name="P67" style:family="paragraph" style:parent-style-name="Text_20_body" style:list-style-name="L15">
      <style:text-properties officeooo:paragraph-rsid="003e7724"/>
    </style:style>
    <style:style style:name="P68" style:family="paragraph" style:parent-style-name="Text_20_body" style:list-style-name="L16"/>
    <style:style style:name="P69" style:family="paragraph" style:parent-style-name="Text_20_body" style:list-style-name="L1">
      <style:text-properties officeooo:rsid="001aff15" officeooo:paragraph-rsid="0047bd48"/>
    </style:style>
    <style:style style:name="P70" style:family="paragraph" style:parent-style-name="Text_20_body" style:list-style-name="L2">
      <style:text-properties officeooo:rsid="001aff15" officeooo:paragraph-rsid="001db9cd"/>
    </style:style>
    <style:style style:name="P71" style:family="paragraph" style:parent-style-name="Text_20_body" style:list-style-name="L7">
      <style:text-properties officeooo:rsid="001aff15" officeooo:paragraph-rsid="001db9cd"/>
    </style:style>
    <style:style style:name="P72" style:family="paragraph" style:parent-style-name="Text_20_body" style:list-style-name="L8">
      <style:text-properties officeooo:rsid="001aff15" officeooo:paragraph-rsid="001e3b34"/>
    </style:style>
    <style:style style:name="P73" style:family="paragraph" style:parent-style-name="Text_20_body" style:list-style-name="L9"/>
    <style:style style:name="P74" style:family="paragraph" style:parent-style-name="Text_20_body" style:list-style-name="L10"/>
    <style:style style:name="P75" style:family="paragraph" style:parent-style-name="Text_20_body" style:list-style-name="L11"/>
    <style:style style:name="P76" style:family="paragraph" style:parent-style-name="Text_20_body">
      <style:text-properties style:font-name="Liberation Serif"/>
    </style:style>
    <style:style style:name="P77" style:family="paragraph" style:parent-style-name="Text_20_body">
      <style:text-properties style:font-name="Liberation Serif" officeooo:paragraph-rsid="004ac5ee"/>
    </style:style>
    <style:style style:name="T1" style:family="text">
      <style:text-properties officeooo:rsid="00255f4e"/>
    </style:style>
    <style:style style:name="T2" style:family="text">
      <style:text-properties officeooo:rsid="004307fe"/>
    </style:style>
    <style:style style:name="T3" style:family="text">
      <style:text-properties officeooo:rsid="004150be"/>
    </style:style>
    <style:style style:name="T4" style:family="text">
      <style:text-properties officeooo:rsid="001aff15"/>
    </style:style>
    <style:style style:name="T5" style:family="text">
      <style:text-properties officeooo:rsid="001ba25c"/>
    </style:style>
    <style:style style:name="T6" style:family="text">
      <style:text-properties fo:color="#8d281e" loext:opacity="100%"/>
    </style:style>
    <style:style style:name="T7" style:family="text">
      <style:text-properties officeooo:rsid="001d5d93"/>
    </style:style>
    <style:style style:name="T8" style:family="text">
      <style:text-properties fo:color="#158466" loext:opacity="100%" officeooo:rsid="001aff15"/>
    </style:style>
    <style:style style:name="T9" style:family="text">
      <style:text-properties fo:color="#000000" loext:opacity="100%"/>
    </style:style>
    <style:style style:name="T10" style:family="text">
      <style:text-properties fo:color="#000000" loext:opacity="100%" officeooo:rsid="001d5d93"/>
    </style:style>
    <style:style style:name="T11" style:family="text">
      <style:text-properties fo:color="#000000" loext:opacity="100%" officeooo:rsid="001db9cd"/>
    </style:style>
    <style:style style:name="T12" style:family="text">
      <style:text-properties fo:color="#000000" loext:opacity="100%" officeooo:rsid="001aff15"/>
    </style:style>
    <style:style style:name="T13" style:family="text">
      <style:text-properties officeooo:rsid="001db9cd"/>
    </style:style>
    <style:style style:name="T14" style:family="text">
      <style:text-properties officeooo:rsid="001e67b3"/>
    </style:style>
    <style:style style:name="T15" style:family="text">
      <style:text-properties officeooo:rsid="0020396c"/>
    </style:style>
    <style:style style:name="T16" style:family="text">
      <style:text-properties style:font-name="Inter" style:font-name-asian="Inter1" style:font-name-complex="Inter1"/>
    </style:style>
    <style:style style:name="T17" style:family="text">
      <style:text-properties style:font-name="Inter" fo:font-style="italic" style:font-name-asian="Inter1" style:font-style-asian="italic" style:font-name-complex="Inter1" style:font-style-complex="italic"/>
    </style:style>
    <style:style style:name="T18" style:family="text">
      <style:text-properties fo:color="#1155cc" loext:opacity="100%" style:text-underline-style="none"/>
    </style:style>
    <style:style style:name="T19" style:family="text">
      <style:text-properties officeooo:rsid="0024f481"/>
    </style:style>
    <style:style style:name="T20" style:family="text">
      <style:text-properties style:text-underline-style="none"/>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style="italic"/>
    </style:style>
    <style:style style:name="T24" style:family="text">
      <style:text-properties fo:font-style="italic" style:font-name-asian="Inter1" style:font-style-asian="italic" style:font-name-complex="Inter1" style:font-style-complex="italic"/>
    </style:style>
    <style:style style:name="T25" style:family="text">
      <style:text-properties officeooo:rsid="00360358"/>
    </style:style>
    <style:style style:name="T26" style:family="text">
      <style:text-properties style:font-name="Liberation Serif"/>
    </style:style>
    <style:style style:name="T27" style:family="text">
      <style:text-properties officeooo:rsid="004780a1"/>
    </style:style>
    <style:style style:name="T28" style:family="text">
      <style:text-properties officeooo:rsid="0047bd48"/>
    </style:style>
    <style:style style:name="T29" style:family="text">
      <style:text-properties officeooo:rsid="0047c5d9"/>
    </style:style>
    <style:style style:name="T30" style:family="text">
      <style:text-properties style:font-name-asian="Inter1" style:font-name-complex="Inter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1"><text:bookmark-start text:name="__RefHeading___Toc552_746608998"/>Rapport du projet <text:span text:style-name="T6">Deforest</text:span><text:bookmark-end text:name="__RefHeading___Toc552_746608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1"><text:a xlink:type="simple" xlink:href="#__RefHeading___Toc552_746608998" text:style-name="Index_20_Link" text:visited-style-name="Index_20_Link">Rapport du projet Deforest<text:tab/>1</text:a></text:p>
          <text:p text:style-name="P22"><text:a xlink:type="simple" xlink:href="#__RefHeading___Toc554_746608998" text:style-name="Index_20_Link" text:visited-style-name="Index_20_Link">I - Équipe du projet:<text:tab/>3</text:a></text:p>
          <text:p text:style-name="P22"><text:a xlink:type="simple" xlink:href="#__RefHeading___Toc556_746608998" text:style-name="Index_20_Link" text:visited-style-name="Index_20_Link">II - Espace de Travail et Outils:<text:tab/>3</text:a></text:p>
          <text:p text:style-name="P22"><text:a xlink:type="simple" xlink:href="#__RefHeading___Toc558_746608998" text:style-name="Index_20_Link" text:visited-style-name="Index_20_Link">III - Description du Sujet et des Données:<text:tab/>3</text:a></text:p>
          <text:p text:style-name="P22"><text:a xlink:type="simple" xlink:href="#__RefHeading___Toc560_746608998" text:style-name="Index_20_Link" text:visited-style-name="Index_20_Link">IV - Planification Globale et Méthodologie:<text:tab/>4</text:a></text:p>
          <text:p text:style-name="P24"><text:a xlink:type="simple" xlink:href="#__RefHeading___Toc764_746608998" text:style-name="Index_20_Link" text:visited-style-name="Index_20_Link">Organigramme des taches:<text:tab/>4</text:a></text:p>
          <text:p text:style-name="P24"><text:a xlink:type="simple" xlink:href="#__RefHeading___Toc766_746608998" text:style-name="Index_20_Link" text:visited-style-name="Index_20_Link">Diagramme de PERT:<text:tab/>5</text:a></text:p>
          <text:p text:style-name="P24"><text:a xlink:type="simple" xlink:href="#__RefHeading___Toc768_746608998" text:style-name="Index_20_Link" text:visited-style-name="Index_20_Link">Diagramme de GANT:<text:tab/>7</text:a></text:p>
          <text:p text:style-name="P22"><text:a xlink:type="simple" xlink:href="#__RefHeading___Toc562_746608998" text:style-name="Index_20_Link" text:visited-style-name="Index_20_Link">V - Répartition des Tâches &amp; Avancement<text:tab/>8</text:a></text:p>
          <text:p text:style-name="P22"><text:a xlink:type="simple" xlink:href="#__RefHeading___Toc564_746608998" text:style-name="Index_20_Link" text:visited-style-name="Index_20_Link">VI – Rapports Personnels<text:tab/>9</text:a></text:p>
          <text:p text:style-name="P23"><text:a xlink:type="simple" xlink:href="#__RefHeading___Toc566_746608998" text:style-name="Index_20_Link" text:visited-style-name="Index_20_Link">Fernandez Mathys<text:tab/>9</text:a></text:p>
          <text:p text:style-name="P24"><text:a xlink:type="simple" xlink:href="#__RefHeading___Toc613_746608998" text:style-name="Index_20_Link" text:visited-style-name="Index_20_Link">Gestion de projet et versioning (GitLab):<text:tab/>9</text:a></text:p>
          <text:p text:style-name="P24"><text:a xlink:type="simple" xlink:href="#__RefHeading___Toc615_746608998" text:style-name="Index_20_Link" text:visited-style-name="Index_20_Link">Prise en main de l'API Global Forest Watch:<text:tab/>9</text:a></text:p>
          <text:p text:style-name="P24"><text:a xlink:type="simple" xlink:href="#__RefHeading___Toc617_746608998" text:style-name="Index_20_Link" text:visited-style-name="Index_20_Link">Traitement des données et affichage (Frontend):<text:tab/>9</text:a></text:p>
          <text:p text:style-name="P24"><text:a xlink:type="simple" xlink:href="#__RefHeading___Toc732_746608998" text:style-name="Index_20_Link" text:visited-style-name="Index_20_Link">Conclusion :<text:tab/>10</text:a></text:p>
          <text:p text:style-name="P23"><text:a xlink:type="simple" xlink:href="#__RefHeading___Toc568_746608998" text:style-name="Index_20_Link" text:visited-style-name="Index_20_Link">Ratsimbazafy Harinavalona<text:tab/>10</text:a></text:p>
          <text:p text:style-name="P23"><text:a xlink:type="simple" xlink:href="#__RefHeading___Toc570_746608998" text:style-name="Index_20_Link" text:visited-style-name="Index_20_Link">Soilihi Timéo<text:tab/>10</text:a></text:p>
          <text:p text:style-name="P23"><text:a xlink:type="simple" xlink:href="#__RefHeading___Toc572_746608998" text:style-name="Index_20_Link" text:visited-style-name="Index_20_Link">Abbes Yiris<text:tab/>10</text:a></text:p>
          <text:p text:style-name="P23"><text:a xlink:type="simple" xlink:href="#__RefHeading___Toc574_746608998" text:style-name="Index_20_Link" text:visited-style-name="Index_20_Link">Zambrano Junior<text:tab/>10</text:a></text:p>
          <text:p text:style-name="P24"><text:a xlink:type="simple" xlink:href="#__RefHeading___Toc576_746608998" text:style-name="Index_20_Link" text:visited-style-name="Index_20_Link">Premier partie l’index<text:tab/>10</text:a></text:p>
          <text:p text:style-name="P24"><text:a xlink:type="simple" xlink:href="#__RefHeading___Toc578_746608998" text:style-name="Index_20_Link" text:visited-style-name="Index_20_Link">Deuxième partie global.css<text:tab/>11</text:a></text:p>
          <text:p text:style-name="P24"><text:a xlink:type="simple" xlink:href="#__RefHeading___Toc580_746608998" text:style-name="Index_20_Link" text:visited-style-name="Index_20_Link">Troisième partie carte.js et carte.css<text:tab/>12</text:a></text:p>
          <text:p text:style-name="P23"><text:a xlink:type="simple" xlink:href="#__RefHeading___Toc582_746608998" text:style-name="Index_20_Link" text:visited-style-name="Index_20_Link">Aballo Zaef<text:tab/>13</text:a></text:p>
          <text:p text:style-name="P24"><text:a xlink:type="simple" xlink:href="#__RefHeading___Toc584_746608998" text:style-name="Index_20_Link" text:visited-style-name="Index_20_Link">Présentation<text:tab/>13</text:a></text:p>
          <text:p text:style-name="P24"><text:a xlink:type="simple" xlink:href="#__RefHeading___Toc586_746608998" text:style-name="Index_20_Link" text:visited-style-name="Index_20_Link">Mise en place des marqueurs de déforestation<text:tab/>13</text:a></text:p>
          <text:p text:style-name="P24"><text:a xlink:type="simple" xlink:href="#__RefHeading___Toc588_746608998" text:style-name="Index_20_Link" text:visited-style-name="Index_20_Link">Mise en place du clustering des marqueurs<text:tab/>13</text:a></text:p>
          <text:p text:style-name="P24"><text:a xlink:type="simple" xlink:href="#__RefHeading___Toc590_746608998" text:style-name="Index_20_Link" text:visited-style-name="Index_20_Link">Sécurisation des clés API<text:tab/>13</text:a></text:p>
          <text:p text:style-name="P24"><text:a xlink:type="simple" xlink:href="#__RefHeading___Toc592_746608998" text:style-name="Index_20_Link" text:visited-style-name="Index_20_Link">Mise en place du backend Express.js<text:tab/>13</text:a></text:p>
          <text:p text:style-name="P24"><text:a xlink:type="simple" xlink:href="#__RefHeading___Toc594_746608998" text:style-name="Index_20_Link" text:visited-style-name="Index_20_Link">Documentation API<text:tab/>13</text:a></text:p>
          <text:p text:style-name="P24"><text:a xlink:type="simple" xlink:href="#__RefHeading___Toc596_746608998" text:style-name="Index_20_Link" text:visited-style-name="Index_20_Link">Utilisation de Git et GitLab<text:tab/>13</text:a></text:p>
          <text:p text:style-name="P24"><text:a xlink:type="simple" xlink:href="#__RefHeading___Toc598_746608998" text:style-name="Index_20_Link" text:visited-style-name="Index_20_Link">Conclusion<text:tab/>14</text:a></text:p>
        </text:index-body>
      </text:table-of-content>
      <text:p text:style-name="Text_20_body"/>
      <text:p text:style-name="Text_20_body"/>
      <text:p text:style-name="Text_20_body"/>
      <text:p text:style-name="Text_20_body"/>
      <text:p text:style-name="Text_20_body"/>
      <text:p text:style-name="P32"/>
      <text:h text:style-name="P42" text:outline-level="2"><text:bookmark-start text:name="__RefHeading___Toc554_746608998"/>I - Équipe du projet:<text:bookmark-end text:name="__RefHeading___Toc554_746608998"/></text:h>
      <text:p text:style-name="P3"><text:s/></text:p>
      <table:table table:name="Tableau1" table:style-name="Tableau1">
        <table:table-column table:style-name="Tableau1.A"/>
        <table:table-column table:style-name="Tableau1.B"/>
        <table:table-row>
          <table:table-cell table:style-name="Tableau1.A1" office:value-type="string">
            <text:p text:style-name="P17">Identité :</text:p>
          </table:table-cell>
          <table:table-cell table:style-name="Tableau1.B1" office:value-type="string">
            <text:p text:style-name="P16">Role :</text:p>
          </table:table-cell>
        </table:table-row>
        <table:table-row>
          <table:table-cell table:style-name="Tableau1.A2" office:value-type="string">
            <text:p text:style-name="P3">- Fernandez Mathys</text:p>
          </table:table-cell>
          <table:table-cell table:style-name="Tableau1.B2" office:value-type="string">
            <text:p text:style-name="P7"><text:span text:style-name="T8">Chef de projet </text:span><text:span text:style-name="T10">| </text:span>Gestionnaire API</text:p>
          </table:table-cell>
        </table:table-row>
        <table:table-row>
          <table:table-cell table:style-name="Tableau1.A2" office:value-type="string">
            <text:p text:style-name="P3">- Soilihi Timéo</text:p>
          </table:table-cell>
          <table:table-cell table:style-name="Tableau1.B2" office:value-type="string">
            <text:p text:style-name="P19">Lead Developer<text:span text:style-name="T9"> </text:span><text:span text:style-name="T10">| Gestionnaire serveur </text:span></text:p>
          </table:table-cell>
        </table:table-row>
        <table:table-row>
          <table:table-cell table:style-name="Tableau1.A2" office:value-type="string">
            <text:p text:style-name="P6">-<text:span text:style-name="T4"> Aballo Zaef</text:span></text:p>
          </table:table-cell>
          <table:table-cell table:style-name="Tableau1.B2" office:value-type="string">
            <text:p text:style-name="P12"><text:span text:style-name="T8">Scrum Master </text:span><text:span text:style-name="T10">| </text:span><text:span text:style-name="T12">Gestionnaire API </text:span><text:span text:style-name="T11">| Responsable Qualité/Tests</text:span></text:p>
          </table:table-cell>
        </table:table-row>
        <table:table-row>
          <table:table-cell table:style-name="Tableau1.A2" office:value-type="string">
            <text:p text:style-name="P3">- Abbes Yiris </text:p>
          </table:table-cell>
          <table:table-cell table:style-name="Tableau1.B2" office:value-type="string">
            <text:p text:style-name="P10">Gestionnaire serveur | Designer UI/UX</text:p>
          </table:table-cell>
        </table:table-row>
        <table:table-row>
          <table:table-cell table:style-name="Tableau1.A2" office:value-type="string">
            <text:p text:style-name="P3">- Zambrano Junior</text:p>
          </table:table-cell>
          <table:table-cell table:style-name="Tableau1.B2" office:value-type="string">
            <text:p text:style-name="Table_20_Contents">Designer UI/UX <text:span text:style-name="T7">| </text:span>Spécialiste Cartographie</text:p>
          </table:table-cell>
        </table:table-row>
        <table:table-row table:style-name="Tableau1.7">
          <table:table-cell table:style-name="Tableau1.A2" office:value-type="string">
            <text:p text:style-name="P3">- Ratsimbazafy Harinavalona</text:p>
          </table:table-cell>
          <table:table-cell table:style-name="Tableau1.B2" office:value-type="string">
            <text:p text:style-name="P11">Data Visualisation <text:span text:style-name="T7">| Designer UI/UX</text:span></text:p>
          </table:table-cell>
        </table:table-row>
      </table:table>
      <text:p text:style-name="P3"/>
      <text:h text:style-name="P43" text:outline-level="2"><text:bookmark-start text:name="__RefHeading___Toc556_746608998"/><text:span text:style-name="T5">II - </text:span>Espace de Travail et Outils:<text:bookmark-end text:name="__RefHeading___Toc556_746608998"/></text:h>
      <text:p text:style-name="P4"/>
      <text:p text:style-name="P4">Dépôt de code : <text:a xlink:type="simple" xlink:href="https://gitlab.univ-lr.fr/pingouins/deforest" text:style-name="Internet_20_link" text:visited-style-name="Visited_20_Internet_20_Link"><text:span text:style-name="T5">lienGitLab</text:span></text:a></text:p>
      <text:p text:style-name="P30">Gestion de projet : <text:a xlink:type="simple" xlink:href="https://gitlab.univ-lr.fr/pingouins/deforest" text:style-name="Internet_20_link" text:visited-style-name="Visited_20_Internet_20_Link"><text:span text:style-name="T5">lienGitLab</text:span></text:a></text:p>
      <text:p text:style-name="P31">Organisation de l’équipe : <text:a xlink:type="simple" xlink:href="https://gitlab.univ-lr.fr/pingouins/deforest" text:style-name="Internet_20_link" text:visited-style-name="Visited_20_Internet_20_Link"><text:span text:style-name="T5">lienGitLab</text:span></text:a></text:p>
      <text:p text:style-name="P27"/>
      <text:h text:style-name="Heading_20_2" text:outline-level="2"><text:bookmark-start text:name="__RefHeading___Toc558_746608998"/><text:span text:style-name="T5">III - </text:span>Description du Sujet et des Données:<text:bookmark-end text:name="__RefHeading___Toc558_746608998"/></text:h>
      <text:list text:style-name="L12">
        <text:list-item>
          <text:p text:style-name="P64">Sujet:</text:p>
          <text:list>
            <text:list-header>
              <text:p text:style-name="P64">Le projet consiste à concevoir et développer une interface web interactive dédiée à la surveillance et à l'analyse de l'état des forêts (déforestation, couverture forestière, etc.). L'application se connecte à l'API publique de Global Forest Watch (GFW) pour récupérer les données environnementales en temps réel ou de manière historique. Ces informations seront restituées à l'utilisateur sous deux formes principales : une carte interactive pour l'analyse spatiale (où se situent les pertes forestières) et un tableau de bord composé de graphiques pour l'analyse statistique (évolution dans le temps, volumes de perte).</text:p>
            </text:list-header>
          </text:list>
        </text:list-item>
        <text:list-item>
          <text:p text:style-name="P65"><text:soft-page-break/>Données utilisées :</text:p>
          <text:list>
            <text:list-item>
              <text:p text:style-name="P64">Sources : </text:p>
              <text:list>
                <text:list-header>
                  <text:p text:style-name="P63">API publique de Global Forest Watch</text:p>
                </text:list-header>
              </text:list>
            </text:list-item>
            <text:list-item>
              <text:p text:style-name="P65">Format :</text:p>
              <text:list>
                <text:list-header>
                  <text:p text:style-name="P65">Les données seront principalement récupérées au format JSON (pour les statistiques) et GeoJSON (pour l'affichage cartographique forestiers).</text:p>
                </text:list-header>
              </text:list>
            </text:list-item>
          </text:list>
        </text:list-item>
      </text:list>
      <text:h text:style-name="P43" text:outline-level="2"><text:bookmark-start text:name="__RefHeading___Toc560_746608998"/><text:span text:style-name="T5">IV - </text:span>Planification Globale et Méthodologie:<text:bookmark-end text:name="__RefHeading___Toc560_746608998"/></text:h>
      <text:p text:style-name="P4"/>
      <text:list xml:id="list2749591419" text:style-name="L13">
        <text:list-header>
          <text:p text:style-name="P48"><draw:frame draw:style-name="fr3" draw:name="Image3" text:anchor-type="char" svg:width="17cm" svg:height="9.319cm" draw:z-index="1"><draw:image xlink:href="Pictures/10000001000002F50000019FEAD6FA18.png" xlink:type="simple" xlink:show="embed" xlink:actuate="onLoad" draw:mime-type="image/png"/></draw:frame>Organigramme des tâches</text:p>
        </text:list-header>
      </text:list>
      <text:h text:style-name="Heading_20_5" text:outline-level="5"><text:bookmark-start text:name="__RefHeading___Toc764_746608998"/>Organigramme des taches:<text:bookmark-end text:name="__RefHeading___Toc764_746608998"/></text:h>
      <text:p text:style-name="P4">L'architecture s'articule autour du nœud central "Projet", qui se divise directement en cinq grands pôles d'expertise :</text:p>
      <text:list text:style-name="L14">
        <text:list-item>
          <text:p text:style-name="P66"><text:span text:style-name="T21">Développement back-end :</text:span> </text:p>
          <text:list>
            <text:list-header>
              <text:p text:style-name="P66">Ce pôle technique regroupe trois sous-tâches essentielles : la gestion des <text:span text:style-name="T21">Données &amp; API</text:span> (connexion à Global Forest Watch), la mise en place du <text:span text:style-name="T21">Socle technique</text:span> initial, et le <text:span text:style-name="T21">Dev back-end</text:span> (création du serveur Node.js et gestion des routes).</text:p>
            </text:list-header>
          </text:list>
        </text:list-item>
        <text:list-item>
          <text:p text:style-name="P66"><text:span text:style-name="T21">Design et interface :</text:span> </text:p>
          <text:list>
            <text:list-header>
              <text:p text:style-name="P66"><text:soft-page-break/>Dédié à la conception visuelle, ce bloc se concentre sur l'ergonomie avant le passage au code. Il inclut le <text:span text:style-name="T21">Cadrage et UX</text:span> (expérience utilisateur) et la <text:span text:style-name="T21">Création interface web</text:span> (structuration des maquettes).</text:p>
            </text:list-header>
          </text:list>
        </text:list-item>
        <text:list-item>
          <text:p text:style-name="P66"><text:span text:style-name="T21">Serveur :</text:span> </text:p>
          <text:list>
            <text:list-header>
              <text:p text:style-name="P66">Un pilier d'infrastructure dédié spécifiquement à la <text:span text:style-name="T21">Gestion des serveurs</text:span>, afin d'assurer l'hébergement et la stabilité de notre environnement.</text:p>
            </text:list-header>
          </text:list>
        </text:list-item>
        <text:list-item>
          <text:p text:style-name="P66"><text:span text:style-name="T21">Développement front-end :</text:span> </text:p>
          <text:list>
            <text:list-header>
              <text:p text:style-name="P66">Ce pôle opérationnel se charge de rendre l'interface interactive. Il est composé de l'<text:span text:style-name="T21">Intégration de la librairie</text:span> (Leaflet pour la carte, Chart.js pour les graphiques) et de l'<text:span text:style-name="T21">Affichage des données sur la carte</text:span> (placement dynamique des points de déforestation).</text:p>
            </text:list-header>
          </text:list>
        </text:list-item>
        <text:list-item>
          <text:p text:style-name="P66"><text:span text:style-name="T21">Gestion du projet :</text:span> </text:p>
          <text:list>
            <text:list-header>
              <text:p text:style-name="P66">Ce pilier transversal est indispensable pour coordonner notre équipe. Il englobe le <text:span text:style-name="T21">Suivi du Gantt</text:span> (respect du planning), l'<text:span text:style-name="T21">Organisation des réunions</text:span>, et enfin la <text:span text:style-name="T21">Rédaction du rapport</text:span> de projet.</text:p>
            </text:list-header>
          </text:list>
        </text:list-item>
      </text:list>
      <text:p text:style-name="P4"/>
      <text:list xml:id="list102657802142691" text:continue-list="list2749591419" text:style-name="L13">
        <text:list-header>
          <text:p text:style-name="P49"><draw:frame draw:style-name="fr2" draw:name="Image2" text:anchor-type="char" svg:width="17cm" svg:height="6.729cm" draw:z-index="0"><draw:image xlink:href="Pictures/1000000000001004000006572A82B0B6.png" xlink:type="simple" xlink:show="embed" xlink:actuate="onLoad" draw:mime-type="image/png"/></draw:frame>Diagramme de PERT</text:p>
        </text:list-header>
      </text:list>
      <text:h text:style-name="Heading_20_5" text:outline-level="5"><text:bookmark-start text:name="__RefHeading___Toc766_746608998"/>Diagramme de PERT:<text:bookmark-end text:name="__RefHeading___Toc766_746608998"/></text:h>
      <text:p text:style-name="Text_20_body">L'architecture de notre gestion de projet s'articule autour de quatre grandes phases :</text:p>
      <text:list text:style-name="L15">
        <text:list-item>
          <text:p text:style-name="P67"><text:span text:style-name="T21">L'amorçage (Conception) :</text:span> </text:p>
          <text:list>
            <text:list-header>
              <text:p text:style-name="P67">Le projet débute par un tronc commun séquentiel incluant la définition des fonctionnalités et de la structure technique (3 jours cumulés). Cette étape conceptuelle est un prérequis absolu avant toute répartition de l'écriture du code.</text:p>
            </text:list-header>
          </text:list>
        </text:list-item>
        <text:list-item>
          <text:p text:style-name="P67"><text:soft-page-break/><text:span text:style-name="T21">La parallélisation (Développement) :</text:span> </text:p>
          <text:list>
            <text:list-header>
              <text:p text:style-name="P67">C'est la zone où l'équipe se divise de manière asynchrone. La création des bases de l'interface web (3j) et la récupération des données de l'API (2j) s'exécutent en parallèle. Le schéma montre clairement que les étapes majeures suivantes (Intégration de la map interactive et Développement des graphiques) sont des nœuds de dépendance croisés : elles nécessitent à la fois que le socle de l'interface soit prêt ET que l'étude des données API soit complétée.</text:p>
            </text:list-header>
          </text:list>
        </text:list-item>
        <text:list-item>
          <text:p text:style-name="P67"><text:span text:style-name="T21">La convergence (Consolidation) :</text:span> </text:p>
          <text:list>
            <text:list-header>
              <text:p text:style-name="P67">Les différentes branches de fonctionnalités (séparation des données historiques/actuelles, ajout de surcouches sur la map) convergent vers deux grosses phases d'intégration spécifiques (8 et 10 jours). C'est le point de rencontre logique où les données backend viennent alimenter les composants frontend.</text:p>
            </text:list-header>
          </text:list>
        </text:list-item>
        <text:list-item>
          <text:p text:style-name="P67"><text:span text:style-name="T21">La finalisation (Qualité) :</text:span> </text:p>
          <text:list>
            <text:list-header>
              <text:p text:style-name="P67">L'ensemble des flux techniques se rejoint sur un nœud d'intégration globale (10j). Cette étape conditionne directement le démarrage de la phase de tests et de corrections de bugs (5j), pour aboutir enfin au déploiement et à la documentation de livraison (3j).</text:p>
            </text:list-header>
          </text:list>
        </text:list-item>
      </text:list>
      <text:p text:style-name="P20"/>
      <text:p text:style-name="P20"/>
      <text:p text:style-name="P20"/>
      <text:p text:style-name="P20"/>
      <text:p text:style-name="P20"/>
      <text:p text:style-name="P20"/>
      <text:list text:continue-list="list102657802142691" text:style-name="L13">
        <text:list-header>
          <text:p text:style-name="P48"><draw:frame draw:style-name="fr1" draw:name="Image1" text:anchor-type="char" svg:x="-0.012cm" svg:y="0cm" svg:width="17.111cm" svg:height="10.458cm" draw:z-index="2"><draw:image xlink:href="Pictures/100000010000036D000002346041DE83.png" xlink:type="simple" xlink:show="embed" xlink:actuate="onLoad" draw:mime-type="image/png"/></draw:frame><text:soft-page-break/>Diagramme de GANTT</text:p>
        </text:list-header>
      </text:list>
      <text:h text:style-name="Heading_20_5" text:outline-level="5"><text:bookmark-start text:name="__RefHeading___Toc768_746608998"/>Diagramme de GANT:<text:bookmark-end text:name="__RefHeading___Toc768_746608998"/></text:h>
      <text:p text:style-name="P4">L'organisation s'est découpée en trois axes de travail simultanés :</text:p>
      <text:list text:style-name="L16">
        <text:list-item>
          <text:p text:style-name="P68"><text:span text:style-name="T21">Infra &amp; Pilotage (Le fil rouge) :</text:span> Le projet a démarré dès les premiers jours de mai par l'initialisation du socle technique (dépôts GitLab) et les recherches préalables sur la gestion du serveur. La coordination de l'équipe et la rédaction de ce rapport ont ensuite fait l'objet d'un suivi continu sur l'intégralité du mois.</text:p>
        </text:list-item>
        <text:list-item>
          <text:p text:style-name="P68"><text:span text:style-name="T21">Data &amp; Back-End :</text:span> En parallèle de la mise en place de l'infrastructure, l'exploration de l'API Global Forest Watch et de ses données a été amorcée (semaines 1 et 2). Cette phase de recherche a permis d'enchaîner avec le développement du backend (serveur Node.js et scripts de traitement JSON) sur les semaines 2 et 3.</text:p>
        </text:list-item>
        <text:list-item>
          <text:p text:style-name="P68"><text:span text:style-name="T21">Design &amp; Front-End :</text:span> Le travail sur l'interface a débuté par une phase de cadrage UX (semaine 1), suivie de la création de la structure web (semaines 2 et 3). L'intégration finale de la carte interactive est intervenue en semaine 3, au moment précis où le backend était structuré pour lui fournir les données environnementales.</text:p>
        </text:list-item>
      </text:list>
      <text:p text:style-name="P4"/>
      <text:p text:style-name="P5"/>
      <text:h text:style-name="P43" text:outline-level="2" text:is-list-header="true"><text:bookmark-start text:name="__RefHeading___Toc562_746608998"/><text:span text:style-name="T5">V - </text:span>Répartition des Tâches <text:span text:style-name="T14">&amp; Avancement</text:span><text:bookmark-end text:name="__RefHeading___Toc562_746608998"/></text:h>
      <text:p text:style-name="P37">Voici la répartition globale des taches:</text:p>
      <text:p text:style-name="P37"/>
      <text:h text:style-name="Heading_20_5" text:outline-level="5">Description de l’état:</text:h>
      <table:table table:name="Tableau3" table:style-name="Tableau3">
        <table:table-column table:style-name="Tableau3.A"/>
        <table:table-row>
          <table:table-cell table:style-name="Tableau3.A1" office:value-type="string">
            <text:p text:style-name="P15">Fait</text:p>
          </table:table-cell>
        </table:table-row>
        <table:table-row>
          <table:table-cell table:style-name="Tableau3.A2" office:value-type="string">
            <text:p text:style-name="P15">En cours</text:p>
          </table:table-cell>
        </table:table-row>
        <table:table-row>
          <table:table-cell table:style-name="Tableau3.A3" office:value-type="string">
            <text:p text:style-name="P15">Pas commencé</text:p>
          </table:table-cell>
        </table:table-row>
      </table:table>
      <text:p text:style-name="P18"/>
      <text:h text:style-name="Heading_20_5" text:outline-level="5">T<text:span text:style-name="T28">ableau de Répartition:</text:span></text:h>
      <text:p text:style-name="P38">Les responsables sont trié par quantité de travail en fonction de chaque domaine de taches.</text:p>
      <table:table table:name="Tableau2" table:style-name="Tableau2">
        <table:table-column table:style-name="Tableau2.A"/>
        <table:table-column table:style-name="Tableau2.B"/>
        <table:table-column table:style-name="Tableau2.C"/>
        <table:table-row>
          <table:table-cell table:style-name="Tableau2.A1" office:value-type="string">
            <text:p text:style-name="P8"><text:span text:style-name="T29">Domaine de</text:span> Tâches</text:p>
          </table:table-cell>
          <table:table-cell table:style-name="Tableau2.A1" office:value-type="string">
            <text:p text:style-name="Table_20_Contents">Description de la tâche</text:p>
          </table:table-cell>
          <table:table-cell table:style-name="Tableau2.C1" office:value-type="string">
            <text:p text:style-name="P8">Responsable</text:p>
          </table:table-cell>
        </table:table-row>
        <table:table-row>
          <table:table-cell table:style-name="Tableau2.A2" office:value-type="string">
            <text:p text:style-name="P13">Cadrage et UX</text:p>
          </table:table-cell>
          <table:table-cell table:style-name="Tableau2.B2" office:value-type="string">
            <text:p text:style-name="P29">Création des maquettes <text:span text:style-name="T13">de l’interface visuelle</text:span></text:p>
          </table:table-cell>
          <table:table-cell table:style-name="Tableau2.C2" office:value-type="string">
            <text:list text:style-name="L1">
              <text:list-item>
                <text:p text:style-name="P69">Zambrano Junior</text:p>
              </text:list-item>
              <text:list-item>
                <text:p text:style-name="P69">Ratsimbazafy Harinavalona</text:p>
              </text:list-item>
            </text:list>
          </table:table-cell>
        </table:table-row>
        <table:table-row>
          <table:table-cell table:style-name="Tableau2.A2" office:value-type="string">
            <text:p text:style-name="P14">Création de l’interface</text:p>
          </table:table-cell>
          <table:table-cell table:style-name="Tableau2.B3" office:value-type="string">
            <text:p text:style-name="P28">Création de l’interface web</text:p>
          </table:table-cell>
          <table:table-cell table:style-name="Tableau2.C3" office:value-type="string">
            <text:list text:style-name="L2">
              <text:list-item>
                <text:p text:style-name="P70">Zambrano Junior</text:p>
              </text:list-item>
              <text:list-item>
                <text:p text:style-name="P70">Ratsimbazafy Harinavalona</text:p>
              </text:list-item>
            </text:list>
          </table:table-cell>
        </table:table-row>
        <table:table-row>
          <table:table-cell table:style-name="Tableau2.A2" office:value-type="string">
            <text:p text:style-name="P13">Données &amp; API</text:p>
          </table:table-cell>
          <table:table-cell table:style-name="Tableau2.B4" office:value-type="string">
            <text:p text:style-name="P29">Exploration de l'API GFW <text:span text:style-name="T13">(utilisation, création d’une clé, etc...)</text:span></text:p>
          </table:table-cell>
          <table:table-cell table:style-name="Tableau2.C4" office:value-type="string">
            <text:list text:style-name="L3">
              <text:list-item>
                <text:p text:style-name="P52">Fernandez Mathys</text:p>
              </text:list-item>
              <text:list-item>
                <text:p text:style-name="P60">Aballo Zaef</text:p>
              </text:list-item>
              <text:list-item>
                <text:p text:style-name="P53">Soilihi Timéo</text:p>
              </text:list-item>
            </text:list>
          </table:table-cell>
        </table:table-row>
        <table:table-row>
          <table:table-cell table:style-name="Tableau2.A2" office:value-type="string">
            <text:p text:style-name="P13">Socle Technique</text:p>
          </table:table-cell>
          <table:table-cell table:style-name="Tableau2.B5" office:value-type="string">
            <text:p text:style-name="P29">Initialisation du projet (dépôts git<text:span text:style-name="T13">lab)</text:span></text:p>
          </table:table-cell>
          <table:table-cell table:style-name="Tableau2.C5" office:value-type="string">
            <text:list text:style-name="L4">
              <text:list-item>
                <text:p text:style-name="P54">Fernandez Mathys</text:p>
              </text:list-item>
            </text:list>
          </table:table-cell>
        </table:table-row>
        <table:table-row>
          <table:table-cell table:style-name="Tableau2.A6" office:value-type="string">
            <text:p text:style-name="P13">Dev - Back-end</text:p>
          </table:table-cell>
          <table:table-cell table:style-name="Tableau2.B6" office:value-type="string">
            <text:p text:style-name="P29">Écriture des scripts pour récupérer les <text:span text:style-name="T27">données</text:span> de GFW</text:p>
          </table:table-cell>
          <table:table-cell table:style-name="Tableau2.C6" office:value-type="string">
            <text:list text:style-name="L5">
              <text:list-item>
                <text:p text:style-name="P55">Fernandez Mathys</text:p>
              </text:list-item>
              <text:list-item>
                <text:p text:style-name="P61">Aballo Zaef</text:p>
              </text:list-item>
              <text:list-item>
                <text:p text:style-name="P56">Soilihi Timéo</text:p>
              </text:list-item>
            </text:list>
          </table:table-cell>
        </table:table-row>
        <table:table-row>
          <table:table-cell table:style-name="Tableau2.A2" office:value-type="string">
            <text:p text:style-name="P13">Dev - Front (Carte)</text:p>
          </table:table-cell>
          <table:table-cell table:style-name="Tableau2.B7" office:value-type="string">
            <text:p text:style-name="P29">Intégration de la librairie cartographique.</text:p>
          </table:table-cell>
          <table:table-cell table:style-name="Tableau2.C7" office:value-type="string">
            <text:list text:style-name="L6">
              <text:list-item>
                <text:p text:style-name="P57">Zambrano Junior</text:p>
              </text:list-item>
              <text:list-item>
                <text:p text:style-name="P58">Soilihi Timéo</text:p>
              </text:list-item>
              <text:list-item>
                <text:p text:style-name="P62">Aballo Zaef</text:p>
              </text:list-item>
            </text:list>
          </table:table-cell>
        </table:table-row>
        <table:table-row>
          <table:table-cell table:style-name="Tableau2.A2" office:value-type="string">
            <text:p text:style-name="P13">Rechercher Gestion Serve<text:span text:style-name="T15">u</text:span>r</text:p>
          </table:table-cell>
          <table:table-cell table:style-name="Tableau2.B8" office:value-type="string">
            <text:p text:style-name="P28">Recherche sur la gestion du serveur</text:p>
          </table:table-cell>
          <table:table-cell table:style-name="Tableau2.C8" office:value-type="string">
            <text:list text:style-name="L7">
              <text:list-item>
                <text:p text:style-name="P59">Soilihi Timéo</text:p>
              </text:list-item>
              <text:list-item>
                <text:p text:style-name="P71">Abbes Yiris </text:p>
              </text:list-item>
            </text:list>
          </table:table-cell>
        </table:table-row>
        <table:table-row>
          <table:table-cell table:style-name="Tableau2.A2" office:value-type="string">
            <text:p text:style-name="P13">Gestion de Projet</text:p>
          </table:table-cell>
          <table:table-cell table:style-name="Tableau2.B9" office:value-type="string">
            <text:p text:style-name="P29">Suivi du Gantt, organisation des <text:soft-page-break/>réunions, rédaction de ce rapport.</text:p>
          </table:table-cell>
          <table:table-cell table:style-name="Tableau2.C9" office:value-type="string">
            <text:list text:style-name="L8">
              <text:list-item>
                <text:p text:style-name="P72">Fernandez Mathys<text:soft-page-break/></text:p>
                <text:p text:style-name="P72"/>
              </text:list-item>
            </text:list>
          </table:table-cell>
        </table:table-row>
      </table:table>
      <text:p text:style-name="P18"/>
      <text:p text:style-name="P18"/>
      <text:p text:style-name="P9"/>
      <text:p text:style-name="P9"/>
      <text:p text:style-name="P9"/>
      <text:h text:style-name="P44" text:outline-level="2"><text:bookmark-start text:name="__RefHeading___Toc564_746608998"/>VI – Rapport<text:span text:style-name="T19">s</text:span> Personnel<text:span text:style-name="T19">s</text:span><text:bookmark-end text:name="__RefHeading___Toc564_746608998"/></text:h>
      <table:table table:name="Tableau4" table:style-name="Tableau4">
        <table:table-column table:style-name="Tableau4.A"/>
        <table:table-row>
          <table:table-cell table:style-name="Tableau4.A1" office:value-type="string">
            <text:h text:style-name="P45" text:outline-level="4"><text:bookmark-start text:name="__RefHeading___Toc566_746608998"/>Fernandez Mathys<text:bookmark-end text:name="__RefHeading___Toc566_746608998"/></text:h>
          </table:table-cell>
        </table:table-row>
        <table:table-row>
          <table:table-cell table:style-name="Tableau4.A2" office:value-type="string">
            <text:p text:style-name="P36">Dans notre groupe de six, j'ai pris le rôle de chef de projet tout en participant activement au code (sur la partie Full-Stack). Ma mission principale était de gérer le cœur de l'application : la connexion avec l'API Global Forest Watch (GFW). </text:p>
            <text:p text:style-name="P36">Mon travail s'est divisé en trois grandes parties.</text:p>
            <text:h text:style-name="Heading_20_5" text:outline-level="5"><text:bookmark-start text:name="__RefHeading___Toc613_746608998"/>Gestion de projet et versioning (GitLab):<text:bookmark-end text:name="__RefHeading___Toc613_746608998"/></text:h>
            <text:p text:style-name="Text_20_body">Pour qu'on puisse avancer sans se marcher sur les pieds, j'ai organisé notre dépôt GitLab :</text:p>
            <text:list text:style-name="L9">
              <text:list-item>
                <text:p text:style-name="P73"><text:span text:style-name="T21">Planification :</text:span> J'ai mis en place les <text:span text:style-name="T23">Milestones</text:span> pour qu'on ait des étapes claires et qu'on respecte la date de rendu.</text:p>
              </text:list-item>
              <text:list-item>
                <text:p text:style-name="P73"><text:span text:style-name="T21">Répartition du travail :</text:span> J'ai créé et assigné les <text:span text:style-name="T23">Issues</text:span> pour que chacun sache exactement ce qu'il avait à faire.</text:p>
              </text:list-item>
              <text:list-item>
                <text:p text:style-name="P73"><text:span text:style-name="T21">Gestion du code (Merge) :</text:span> Je me suis occupé de fusionner les branches de tout le monde. J'ai notamment dû gérer les conflits de <text:span text:style-name="T23">merge</text:span> sur GitLab (comme lorsqu'il a fallu fusionner le système de clustering de la carte avec <text:span text:style-name="T25">l</text:span>es bulles de statut), pour être sûr que la branche principale <text:span text:style-name="Source_20_Text"><text:span text:style-name="T25">dev</text:span></text:span> reste toujours propre et fonctionnelle.</text:p>
              </text:list-item>
            </text:list>
            <text:p text:style-name="Text_20_body"/>
            <text:h text:style-name="P47" text:outline-level="5"><text:bookmark-start text:name="__RefHeading___Toc615_746608998"/>Prise en main de l'API Global Forest Watch:<text:bookmark-end text:name="__RefHeading___Toc615_746608998"/></text:h>
            <text:p text:style-name="P34">Comme la récupération des données était le point central du projet, j'ai passé une bonne partie du temps à comprendre comment l'API fonctionnait :</text:p>
            <text:list text:style-name="L10">
              <text:list-item>
                <text:p text:style-name="P74"><text:span text:style-name="T21">Compréhension technique :</text:span> J'ai épluché la documentation de GFW pour comprendre comment structurer nos requêtes (notamment le fait d'envoyer du SQL via des appels <text:soft-page-break/>POST).</text:p>
              </text:list-item>
              <text:list-item>
                <text:p text:style-name="P74"><text:span text:style-name="T21">Code Backend :</text:span> J'ai implémenté les appels avec <text:span text:style-name="Source_20_Text"><text:span text:style-name="T26">fetch</text:span></text:span> dans notre fichier serveur, pour que notre backend interroge l'API avec les bonnes coordonnées quand l'utilisateur dessine une zone.</text:p>
              </text:list-item>
            </text:list>
            <text:h text:style-name="Heading_20_5" text:outline-level="5"><text:bookmark-start text:name="__RefHeading___Toc617_746608998"/>Traitement des données et affichage (Frontend):<text:bookmark-end text:name="__RefHeading___Toc617_746608998"/></text:h>
            <text:p text:style-name="P34">Une fois les données reçues sur le client, il fallait s'assurer qu'elles s'affichent correctement sans faire ralentir la page :</text:p>
            <text:list text:style-name="L11">
              <text:list-item>
                <text:p text:style-name="P75"><text:span text:style-name="T21">Tri des données :</text:span> J'ai géré l'extraction d<text:span text:style-name="T25">u JSON</text:span> renvoyé par l'API. J'ai aussi aidé à mettre en place un filtre (avec un objet <text:span text:style-name="Source_20_Text">Set</text:span>) pour éviter d'afficher plusieurs fois les mêmes coordonnées et alléger le rendu de la carte.</text:p>
              </text:list-item>
              <text:list-item>
                <text:p text:style-name="P75"><text:span text:style-name="T21">Interface (UI) :</text:span> J'ai codé un système de bulles de statut pour que l'utilisateur comprenne ce qui se passe. En utilisant des bl<text:span text:style-name="T25">oc ‘try catch’</text:span>, le code gère proprement les erreurs (comme les plantages 500 ou les problèmes d'autorisation 403) et affiche des messages clairs (Recherche en cours, Succès, Aucun résultat, Erreur) au lieu de simplement renvoyer des erreurs invisibles dans la console.</text:p>
              </text:list-item>
            </text:list>
            <text:h text:style-name="Heading_20_5" text:outline-level="5"><text:bookmark-start text:name="__RefHeading___Toc732_746608998"/>Conclusion :<text:bookmark-end text:name="__RefHeading___Toc732_746608998"/></text:h>
            <text:p text:style-name="P35">Ce projet m'a permis de toucher un peu à toutes les couches d'une application web. Ça m'a vraiment fait progresser en JavaScript (surtout sur l'asynchrone et les promesses) et sur la manipulation d'API; Surtout, le fait d'agir comme chef de projet m'a donné une vraie expérience de coordination d'équipe avec Git, ce qui correspond tout à fait à ce que j'aimerais faire plus tard dans la gestion de projets informatiques ou le Big Data.</text:p>
            <text:p text:style-name="Text_20_body"/>
            <text:p text:style-name="P33"/>
            <text:p text:style-name="P33"/>
            <text:p text:style-name="P33"/>
            <text:p text:style-name="P33"/>
          </table:table-cell>
        </table:table-row>
        <table:table-row table:style-name="Tableau4.3">
          <table:table-cell table:style-name="Tableau4.A2" office:value-type="string">
            <text:h text:style-name="Heading_20_4" text:outline-level="4"><text:bookmark-start text:name="__RefHeading___Toc568_746608998"/>Ratsimbazafy Harinavalona<text:bookmark-end text:name="__RefHeading___Toc568_746608998"/></text:h>
          </table:table-cell>
        </table:table-row>
      </table:table>
      <text:p text:style-name="P39"/>
      <text:p text:style-name="P26"/>
      <text:p text:style-name="P26"/>
      <text:p text:style-name="P26"/>
      <text:p text:style-name="P26"/>
      <text:h text:style-name="Heading_20_4" text:outline-level="4"><text:bookmark-start text:name="__RefHeading___Toc570_746608998"/><text:soft-page-break/>Soilihi Timéo<text:bookmark-end text:name="__RefHeading___Toc570_746608998"/></text:h>
      <text:p text:style-name="P40">Dans le cadre de ce projet, j'ai travaillé sur plusieurs aspects, allant de la gestion du serveur jusqu'à l'amélioration de l'interface utilisateur, afin de rendre l'application à la fois fonctionnelle et plus agréable à utiliser.</text:p>
      <text:h text:style-name="Heading_20_5" text:outline-level="5">Mise en place du serveur et déploiement</text:h>
      <text:p text:style-name="P40">Dans un premier temps, je me suis occupé de toute la partie hébergement pour que notre projet soit accessible en ligne. J'ai configuré un serveur web Apache, ce qui m'a permis de déployer notre projet. Pour gérer l'arborescence et envoyer nos fichiers locaux vers le serveur, j'ai utilisé le client FTP FileZilla, qui est une application qui permet de transférer les fichiers facilement par glisser-déposer. Cela nous a permis de mettre notre projet en ligne simplement.</text:p>
      <text:h text:style-name="Heading_20_5" text:outline-level="5">Automatisation de l'environnement de travail</text:h>
      <text:p text:style-name="P40">Afin d'optimiser notre flux de travail collaboratif, nous utilisons l'extension Visual Studio Code Remote - SSH. Au lieu de développer en local puis de transférer les fichiers, cet outil nous permet de nous connecter et de coder directement sur le serveur distant. Chaque sauvegarde met instantanément à jour le code sur le serveur, éliminant ainsi le besoin de transferts manuels (via FTP/SFTP) et réduisant le risque de perte de données.</text:p>
      <text:h text:style-name="Heading_20_5" text:outline-level="5">Amélioration de la carte et correction des bugs d'affichage</text:h>
      <text:p text:style-name="P40">La plus grosse partie de mon travail sur le code a été de rendre la carte interactive beaucoup plus propre. Au début, on rencontrait un problème avec Leaflet : quand plusieurs alertes avaient exactement les mêmes coordonnées (notre API nous donne parfois plusieurs fois le même point à des dates différentes), le plugin créait un effet "toile d'araignée" (spiderfy) très géométrique et pas du tout naturel. Quand on zoomait au maximum, il affichait les points à égale distance. Pour corriger cela, j'ai désactivé cet effet artificiel et j'ai développé un algorithme de filtrage (en utilisant un objet <text:span text:style-name="Source_20_Text">Set</text:span> en JavaScript). Désormais, si plusieurs points tombent exactement au même endroit, le code les fusionne en mémoire pour n'en afficher qu'un seul. Cela évite de surcharger l'écran et la carte reste lisible, même quand on dézoome.</text:p>
      <text:h text:style-name="Heading_20_5" text:outline-level="5"><text:span text:style-name="T22">Ergonomie et interface utilisateur</text:span> </text:h>
      <text:p text:style-name="P77">Enfin, j'ai voulu simplifier la vie de l'utilisateur lors de ses recherches sur la carte. Au départ, on devait zoomer manuellement sur une zone précise pour afficher les points liés aux lieux de déforestation, ce qui n'était pas très pratique. J’ai donc créé une fonctionnalité de sélection "drag and draw" (similaire à une capture d’écran) qui va afficher tous les points présents dans cette zone précise. J'ai également développé un bouton "Poubelle", intégré directement dans la barre d'outils de la carte. Un seul clic suffit pour tout réinitialiser : il efface le rectangle de sélection, retire tous les points rouges, remet le compteur d'alertes à zéro et vide la mémoire du programme pour les recherches suivantes. Cela évite d'avoir à recharger la page.</text:p>
      <text:p text:style-name="P40"/>
      <text:h text:style-name="Heading_20_4" text:outline-level="4"><text:bookmark-start text:name="__RefHeading___Toc572_746608998"/><text:soft-page-break/>Abbes Yiris <text:bookmark-end text:name="__RefHeading___Toc572_746608998"/></text:h>
      <text:p text:style-name="P25"/>
      <text:h text:style-name="Heading_20_4" text:outline-level="4" text:is-list-header="true"><text:bookmark-start text:name="__RefHeading___Toc574_746608998"/>Zambrano Junior<text:bookmark-end text:name="__RefHeading___Toc574_746608998"/></text:h>
      <text:h text:style-name="Heading_20_5" text:outline-level="5"><text:bookmark text:name="_5kjy1hgh5mze"/><text:bookmark-start text:name="__RefHeading___Toc576_746608998"/>Premier partie l’index<text:bookmark-end text:name="__RefHeading___Toc576_746608998"/></text:h>
      <text:p text:style-name="P76">Pour la première étape, je me suis occupé du fichier index.html. En fait, c'est la structure de base du tableau de bord, donc j'ai essayé de faire ça assez lisiblement. Au début, j'avais tendance à utiliser des balises &lt;div&gt; un peu partout, mais on s'y perd vite quand on cherche un bug. Du coup, j'ai organisé le code avec des balises plus spécifiques : j'ai placé un &lt;header&gt; pour la partie haute, un grand &lt;main&gt; pour contenir l'espace de la carte, et un &lt;aside&gt; pour regrouper les trois widgets sur le côté droit.</text:p>
      <text:p text:style-name="P76">Ensuite, il a fallu gérer le style CSS. Au lieu de faire un seul fichier énorme qui contrôle tout le site, j'ai préféré créer plusieurs petits fichiers séparés (un pour la carte, un pour l'évolution, le global, etc.). Comme on travaille en groupe, ça limite pas mal les problèmes au moment de mettre nos codes en commun sur GitLab. Ça évite les conflits où deux personnes modifient le même gros fichier en même temps.</text:p>
      <text:p text:style-name="P76">Il y avait aussi l'intégration des bibliothèques externes, c'est-à-dire Leaflet pour afficher la carte et Chart.js pour le graphique. Le souci avec ces gros scripts, c'est que ça peut ralentir l'affichage de la page. Donc, j'ai simplement ajouté l'attribut defer quand je les ai importés. Ça permet au navigateur d'afficher le visuel de la page en premier, pour ne pas laisser l'utilisateur bloqué devant un écran blanc pendant que les scripts finissent de se charger en arrière-plan.</text:p>
      <text:p text:style-name="P76"><text:span text:style-name="T30">Pour finir, même si on n'avait pas encore les données du serveur pour remplir les widgets, j'ai préparé les espaces dans le HTML. J'ai ajouté des id précis sur les zones de texte vides, par exemple id="compteur-carbone". L'idée c'était de s'avancer un peu : quand il faudra injecter les vrais chiffres avec JavaScript plus tard, ce sera beaucoup plus direct pour cibler les bons éléments</text:span>.</text:p>
      <text:p text:style-name="Text_20_body"/>
      <text:h text:style-name="Heading_20_5" text:outline-level="5"><text:bookmark text:name="_2s8d83cfpnto"/><text:bookmark-start text:name="__RefHeading___Toc578_746608998"/>Deuxième partie global.css<text:bookmark-end text:name="__RefHeading___Toc578_746608998"/></text:h>
      <text:p text:style-name="Text_20_body"><text:span text:style-name="T30">Après le HTML, il fallait s'occuper de l'apparence. J'ai commencé par le fichier global.css. Une des premières étapes a été d'importer la police d'écriture, </text:span><text:span text:style-name="T24">Quicksand</text:span><text:span text:style-name="T30">. J'aurais pu simplement indiquer le nom de la police dans le code, mais si l'utilisateur ne l'a pas installée sur son ordinateur, le rendu visuel n'aurait pas fonctionné comme prévu. Pour éviter cela, j'ai utilisé la règle @font-face pour lier directement les fichiers .ttf que nous avions téléchargés dans notre dossier. Cela permet de conserver l'esthétique du site sur n'importe quel écran.</text:span></text:p>
      <text:p text:style-name="Text_20_body">Ensuite, pour gérer les couleurs, cela devenait vite répétitif de copier les codes comme #2B3A32 un peu partout, avec toujours le risque de se tromper d'un caractère. J'ai donc préféré utiliser des variables CSS dans le :root. J'y ai défini nos couleurs principales (le vert forêt, le terracotta pour les alertes) ainsi que les arrondis des éléments. L'avantage de cette méthode, c'est que si l'on décide <text:soft-page-break/>finalement que le vert est trop sombre, il suffit de le modifier à cet unique endroit pour que tout le site se mette à jour.</text:p>
      <text:p text:style-name="Text_20_body">Pour la mise en page, aligner correctement la carte avec les statistiques a demandé un peu de réflexion. J'ai finalement opté pour un display: grid sur le conteneur principal. Concrètement, j'ai fixé la largeur de la barre de droite (les widgets) à 350px pour garantir sa lisibilité, et j'ai configuré l'espace de la carte pour qu'il prenne le reste de l'écran en utilisant l'unité 1fr. Cela donne le maximum de place à la carte sans cacher les autres informations. À l'intérieur des widgets eux-mêmes, j'ai plutôt utilisé flexbox pour empiler les titres et les données correctement sans avoir de problèmes de décalage avec les marges.</text:p>
      <text:p text:style-name="Text_20_body"/>
      <text:h text:style-name="Heading_20_5" text:outline-level="5"><text:bookmark text:name="_ppndekqmk25s"/><text:bookmark-start text:name="__RefHeading___Toc580_746608998"/><text:span text:style-name="T20">Troisième partie </text:span><text:a xlink:type="simple" xlink:href="http://carte.js/" text:style-name="ListLabel_20_1" text:visited-style-name="ListLabel_20_1"><text:span text:style-name="T18">carte.js</text:span></text:a><text:span text:style-name="T20"> et carte.css</text:span><text:bookmark-end text:name="__RefHeading___Toc580_746608998"/></text:h>
      <text:p text:style-name="P51">Pour cette troisième étape, je me suis concentré sur l'affichage de la carte interactive en utilisant la bibliothèque Leaflet. Dans le fichier carte.js, j'ai initialisé la carte en la centrant sur des coordonnées globales de départ.</text:p>
      <text:p text:style-name="P50">Il a fallu ensuite choisir le visuel de la carte. J'ai configuré les tuiles pour utiliser le fournisseur CartoDB avec leur thème "Dark Matter". Ce fond sombre s'intègre beaucoup mieux avec le design du tableau de bord, et cela permettra surtout de bien faire ressortir les futurs points de données. En manipulant l'interface, je me suis rendu compte que la carte se comportait un peu comme un globe : les continents se répétaient indéfiniment si on allait trop sur les côtés. Pour corriger ça, j'ai tout simplement ajouté l'option noWrap: true pour couper cette répétition.</text:p>
      <text:p text:style-name="P50">Ensuite, pour éviter que l'utilisateur ne se perde dans l'espace vide en glissant la souris trop vers le nord ou le sud, j'ai défini des limites de coordonnées strictes avec maxBounds. J'ai couplé ça avec un maxBoundsViscosity à 1.0 pour vraiment bloquer fermement la caméra sur les bords et empêcher tout dépassement. Concernant le zoom, je l'ai configuré pour qu'il commence et se bloque à un minimum de 3. Au début, j'avais laissé un zoom plus éloigné, mais ça créait des bandes vides sur les côtés : la carte avait l'air un peu coupée et ne s'accommodait pas bien avec l'espace que je lui avais réservé dans l'interface. J'ai aussi mis un maximum à 18 pour éviter que les tuiles ne deviennent floues si on s'approche trop. L'idée globale, avec toutes ces limites, c'était de garder un contrôle total sur l'exploration pour que l'affichage reste toujours propre et bien encadré.</text:p>
      <text:p text:style-name="P50">En observant l'interface par défaut, j'ai aussi remarqué que certains éléments méritaient d'être réorganisés. Leaflet affiche automatiquement ses boutons de zoom en haut à gauche et un texte d'attribution en bas à droite. J'ai préféré désactiver le texte d'attribution sur l'écran pour garder un visuel très net, bien que j'aie conservé les crédits officiels (OpenStreetMap et CARTO) directement dans la configuration du code pour respecter les licences. Concernant les boutons de zoom, je les ai désactivés en haut pour les recréer en bas à gauche de l'écran. Vu que la barre des statistiques prend déjà toute la partie droite, placer ces boutons à gauche permet d'équilibrer l'espace.</text:p>
      <text:p text:style-name="P50"><text:soft-page-break/>Enfin, j'ai fait un dernier ajustement dans un fichier séparé, carte.css. Quand on atteignait la limite sud de la carte, sous l'Antarctique, il y avait parfois un espace vide qui s'affichait avec un fond gris clair par défaut. Pour corriger cela, j'ai modifié la couleur de fond du conteneur de Leaflet pour mettre un noir très profond (#0f0f0f). Grâce à cela, l'océan sombre se fond parfaitement avec le fond du site.</text:p>
      <text:p text:style-name="Text_20_body"/>
      <text:p text:style-name="P27"/>
      <text:h text:style-name="P46" text:outline-level="4"><text:bookmark-start text:name="__RefHeading___Toc582_746608998"/>Aballo Zaef<text:bookmark-end text:name="__RefHeading___Toc582_746608998"/></text:h>
      <text:h text:style-name="Heading_20_5" text:outline-level="5"><text:bookmark-start text:name="__RefHeading___Toc584_746608998"/>Présentation<text:bookmark-end text:name="__RefHeading___Toc584_746608998"/></text:h>
      <text:p text:style-name="Text_20_body">Dans le cadre du projet transversal Deforest, j’ai principalement travaillé sur l’intégration des données API, l’affichage des points de déforestation sur la carte, la mise en place du clustering, la sécurisation des clés API ainsi que la documentation technique de l’API.</text:p>
      <text:h text:style-name="Heading_20_5" text:outline-level="5"><text:bookmark-start text:name="__RefHeading___Toc586_746608998"/>Mise en place des marqueurs de déforestation<text:bookmark-end text:name="__RefHeading___Toc586_746608998"/></text:h>
      <text:p text:style-name="Text_20_body">J’ai développé la partie permettant d’ajouter des points de déforestation sur la carte Leaflet. J’ai créé une fonction JavaScript permettant d’ajouter dynamiquement des marqueurs, d’afficher des popups contenant des informations et de préparer l’intégration des données réelles provenant de l’API Global Forest Watch.</text:p>
      <text:h text:style-name="Heading_20_5" text:outline-level="5"><text:bookmark-start text:name="__RefHeading___Toc588_746608998"/>Mise en place du clustering des marqueurs<text:bookmark-end text:name="__RefHeading___Toc588_746608998"/></text:h>
      <text:p text:style-name="Text_20_body">Afin d’améliorer la lisibilité de la carte lorsque plusieurs alertes apparaissent dans une même zone, j’ai intégré le système de clustering avec le plugin Leaflet MarkerCluster. Cette fonctionnalité permet de regrouper automatiquement les points proches, d’éviter une surcharge visuelle et d’améliorer les performances de la carte.</text:p>
      <text:h text:style-name="Heading_20_5" text:outline-level="5"><text:bookmark-start text:name="__RefHeading___Toc590_746608998"/>Sécurisation des clés API<text:bookmark-end text:name="__RefHeading___Toc590_746608998"/></text:h>
      <text:p text:style-name="Text_20_body">J’ai participé à la mise en place d’une architecture backend sécurisée utilisant Node.js, Express.js, dotenv et CORS. Le frontend communique désormais avec un backend Express qui interroge ensuite l’API Global Forest Watch. Les clés API sont stockées dans un fichier .env afin de ne pas être visibles dans le navigateur.</text:p>
      <text:h text:style-name="Heading_20_5" text:outline-level="5"><text:bookmark-start text:name="__RefHeading___Toc592_746608998"/>Mise en place du backend Express.js<text:bookmark-end text:name="__RefHeading___Toc592_746608998"/></text:h>
      <text:p text:style-name="Text_20_body">J’ai participé à la création du backend Express.js utilisé comme intermédiaire entre le frontend et l’API GFW. Les fonctionnalités réalisées comprennent la création du serveur backend, la gestion des routes API, la récupération des données JSON ainsi que la gestion des erreurs.</text:p>
      <text:h text:style-name="Heading_20_5" text:outline-level="5"><text:bookmark-start text:name="__RefHeading___Toc594_746608998"/><text:soft-page-break/>Documentation API<text:bookmark-end text:name="__RefHeading___Toc594_746608998"/></text:h>
      <text:p text:style-name="Text_20_body">J’ai rédigé une documentation technique de l’API afin d’expliquer l’architecture backend, l’installation de Node.js, l’utilisation de npm, le rôle du fichier .env et le fonctionnement des endpoints API.</text:p>
      <text:h text:style-name="Heading_20_5" text:outline-level="5"><text:bookmark-start text:name="__RefHeading___Toc596_746608998"/>Utilisation de Git et GitLab<text:bookmark-end text:name="__RefHeading___Toc596_746608998"/></text:h>
      <text:p text:style-name="Text_20_body">Tout mon travail a été réalisé avec Git et GitLab à travers des branches dédiées, plusieurs commits structurés et des Merge Requests afin de conserver un historique clair des modifications apportées au projet.</text:p>
      <text:h text:style-name="Heading_20_5" text:outline-level="5"><text:bookmark-start text:name="__RefHeading___Toc598_746608998"/>Conclusion<text:bookmark-end text:name="__RefHeading___Toc598_746608998"/></text:h>
      <text:p text:style-name="Text_20_body">Les tâches que j’ai réalisées ont permis d’améliorer l’interactivité de la carte, de préparer l’intégration des données réelles de déforestation, de sécuriser les accès API et de mettre en place une architecture backend plus professionnel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tyle:font-family-generic="roman" style:font-pitch="variable"/>
    <style:font-face style:name="Inter1"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padding="0.049cm" fo:border-left="none" fo:border-right="none" fo:border-top="2.24pt solid #000000" fo:border-bottom="2.24pt solid #000000" style:join-border="true">
        <style:tab-stops/>
      </style:paragraph-properties>
      <style:text-properties style:text-line-through-style="none" style:text-line-through-type="none" fo:font-size="16pt" style:text-underline-style="none" fo:font-weight="bold" fo:background-color="transparent" style:font-size-asian="16pt" style:font-weight-asian="bold" style:font-size-complex="16pt" style:font-weight-complex="bold" style:text-overline-style="none" style:text-overline-color="font-color"/>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Legende" style:family="paragraph" style:parent-style-name="Text_20_body">
      <style:paragraph-properties fo:padding="0.049cm" fo:border-left="0.06pt solid #000000" fo:border-right="0.06pt solid #000000" fo:border-top="none" fo:border-bottom="0.06pt solid #000000"/>
      <style:text-properties fo:font-style="italic"/>
    </style:style>
    <style:style style:name="Heading_20_3" style:display-name="Heading 3" style:family="paragraph"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fo:text-align="center" style:justify-single-word="false" style:page-number="auto" fo:padding="0.049cm" fo:border="0.06pt dashed #000000">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1155cc"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text-properties officeooo:paragraph-rsid="004150be"/>
    </style:style>
    <style:style style:name="MP2" style:family="paragraph" style:parent-style-name="Footer">
      <style:paragraph-properties fo:text-align="end" style:justify-single-word="false"/>
    </style:style>
    <style:style style:name="MT1" style:family="text">
      <style:text-properties officeooo:rsid="00255f4e"/>
    </style:style>
    <style:style style:name="MT2" style:family="text">
      <style:text-properties officeooo:rsid="004307fe"/>
    </style:style>
    <style:style style:name="MT3" style:family="text">
      <style:text-properties officeooo:rsid="004150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L2 S4 <text:span text:style-name="MT1">[</text:span>Deforest<text:span text:style-name="MT1">]</text:span> </text:p>
        <text:p text:style-name="Header_20_left"><text:span text:style-name="MT2">G</text:span><text:span text:style-name="MT3">roupe [Pingouins]</text:span></text:p>
      </style:header>
      <style:footer>
        <text:p text:style-name="MP2"><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7T12:35:39.809006670</meta:creation-date>
    <dc:date>2026-05-30T10:26:55.638249800</dc:date>
    <meta:editing-duration>PT8H22M12S</meta:editing-duration>
    <meta:editing-cycles>38</meta:editing-cycles>
    <meta:generator>LibreOffice/24.2.7.2$Linux_X86_64 LibreOffice_project/420$Build-2</meta:generator>
    <meta:print-date>2026-05-29T17:35:39.276286651</meta:print-date>
    <meta:printed-by>Fichiers PDF</meta:printed-by>
    <meta:document-statistic meta:table-count="4" meta:image-count="3" meta:object-count="0" meta:page-count="15" meta:paragraph-count="204" meta:word-count="3551" meta:character-count="22025" meta:non-whitespace-character-count="18704"/>
  </office:meta>
</office:document-meta>
</file>